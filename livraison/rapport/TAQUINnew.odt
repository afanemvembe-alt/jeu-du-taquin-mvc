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7000000F62A84C253.png" manifest:media-type="image/png"/>
  <manifest:file-entry manifest:full-path="Pictures/100000010000010F0000007C1B67FDEC.png" manifest:media-type="image/png"/>
  <manifest:file-entry manifest:full-path="Pictures/1000000000000283000000D6DDEC73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LaM Display" svg:font-family="'ADLaM Display'"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er">
      <style:paragraph-properties fo:margin-top="0.423cm" fo:margin-bottom="0.282cm" style:contextual-spacing="false" fo:text-align="center" style:justify-single-word="false" fo:padding-left="0cm" fo:padding-right="0cm" fo:padding-top="0.353cm" fo:padding-bottom="0cm" fo:border-left="none" fo:border-right="none" fo:border-top="0.74pt solid #156082" fo:border-bottom="none" style:shadow="none"/>
    </style:style>
    <style:style style:name="P2" style:family="paragraph" style:parent-style-name="Normal">
      <style:paragraph-properties fo:text-align="center" style:justify-single-word="false"/>
    </style:style>
    <style:style style:name="P3" style:family="paragraph" style:parent-style-name="Normal">
      <style:text-properties style:font-name="Times New Roman"/>
    </style:style>
    <style:style style:name="P4" style:family="paragraph" style:parent-style-name="Normal">
      <style:paragraph-properties fo:text-align="center" style:justify-single-word="false"/>
      <style:text-properties style:font-name="Times New Roman"/>
    </style:style>
    <style:style style:name="P5" style:family="paragraph" style:parent-style-name="Normal">
      <style:paragraph-properties fo:hyphenation-ladder-count="no-limit"/>
      <style:text-properties style:font-name="Times New Roman" fo:hyphenate="true" loext:hyphenation-no-caps="false" loext:hyphenation-no-last-word="false" loext:hyphenation-word-char-count="no-limit" loext:hyphenation-zone="no-limit"/>
    </style:style>
    <style:style style:name="P6" style:family="paragraph" style:parent-style-name="Normal">
      <style:paragraph-properties fo:hyphenation-ladder-count="no-limit" fo:break-before="page"/>
      <style:text-properties style:font-name="Times New Roman" fo:hyphenate="true" loext:hyphenation-no-caps="false" loext:hyphenation-no-last-word="false" loext:hyphenation-word-char-count="no-limit" loext:hyphenation-zone="no-limit"/>
    </style:style>
    <style:style style:name="P7" style:family="paragraph" style:parent-style-name="Normal">
      <style:paragraph-properties fo:text-align="justify" style:justify-single-word="false"/>
      <style:text-properties style:font-name="Times New Roman"/>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margin-left="1.27cm">
        <style:tab-stops/>
      </style:paragraph-properties>
    </style:style>
    <style:style style:name="P10" style:family="paragraph" style:parent-style-name="Normal">
      <style:paragraph-properties fo:text-align="end" style:justify-single-word="false"/>
    </style:style>
    <style:style style:name="P11" style:family="paragraph" style:parent-style-name="Header">
      <style:paragraph-properties fo:margin-top="0.423cm" fo:margin-bottom="0.282cm" style:contextual-spacing="false" fo:text-align="center" style:justify-single-word="false" fo:padding-left="0cm" fo:padding-right="0cm" fo:padding-top="0.353cm" fo:padding-bottom="0cm" fo:border-left="none" fo:border-right="none" fo:border-top="0.74pt solid #156082" fo:border-bottom="none" style:shadow="none"/>
    </style:style>
    <style:style style:name="P12" style:family="paragraph" style:parent-style-name="Normal" style:master-page-name="MP0">
      <style:paragraph-properties style:page-number="auto" fo:break-before="page"/>
    </style:style>
    <style:style style:name="P13" style:family="paragraph" style:parent-style-name="Normal" style:list-style-name="L1"/>
    <style:style style:name="P14" style:family="paragraph" style:parent-style-name="Normal" style:list-style-name="L2"/>
    <style:style style:name="P15" style:family="paragraph">
      <style:paragraph-properties fo:text-align="center"/>
      <style:text-properties fo:color="#ffffff" loext:opacity="100%"/>
    </style:style>
    <style:style style:name="P16" style:family="paragraph">
      <loext:graphic-properties draw:fill="solid" draw:fill-color="#002060" draw:opacity="100%"/>
      <style:paragraph-properties style:writing-mode="lr-tb" style:font-independent-line-spacing="true"/>
      <style:text-properties fo:color="#ffffff" loext:opacity="100%"/>
    </style:style>
    <style:style style:name="P17" style:family="paragraph">
      <style:paragraph-properties fo:margin-left="0cm" fo:margin-right="0cm" fo:margin-top="0cm" fo:margin-bottom="0cm" fo:line-height="105%" fo:text-align="center" fo:text-indent="0cm" style:text-autospace="ideograph-alpha" style:punctuation-wrap="hanging"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Aptos"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8" style:family="paragraph">
      <loext:graphic-properties draw:fill="solid" draw:fill-color="#002060" draw:opacity="100%"/>
      <style:paragraph-properties fo:margin-left="0cm" fo:margin-right="0cm" fo:margin-top="0cm" fo:margin-bottom="0cm" fo:line-height="105%" fo:text-align="center" fo:text-indent="0cm" style:text-autospace="ideograph-alpha" style:punctuation-wrap="hanging" style:line-break="strict" loext:tab-stop-distance="0cm" style:writing-mode="lr-tb"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Aptos"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9" style:family="paragraph">
      <loext:graphic-properties draw:fill="solid" draw:fill-color="#002060" draw:opacity="100%"/>
      <style:paragraph-properties fo:text-align="center" style:writing-mode="lr-tb" style:font-independent-line-spacing="true"/>
      <style:text-properties fo:color="#ffffff" loext:opacity="100%"/>
    </style:style>
    <style:style style:name="P20" style:family="paragraph">
      <style:paragraph-properties fo:text-align="center"/>
    </style:style>
    <style:style style:name="P21" style:family="paragraph">
      <loext:graphic-properties draw:fill="none"/>
      <style:paragraph-properties style:writing-mode="lr-tb" style:font-independent-line-spacing="true"/>
    </style:style>
    <style:style style:name="P22" style:family="paragraph">
      <loext:graphic-properties draw:fill="solid" draw:fill-color="#002060" draw:opacity="100%"/>
      <style:paragraph-properties style:writing-mode="lr-tb" style:font-independent-line-spacing="true"/>
    </style:style>
    <style:style style:name="P23" style:family="paragraph">
      <loext:graphic-properties draw:fill="none"/>
    </style:style>
    <style:style style:name="P24" style:family="paragraph">
      <loext:graphic-properties draw:fill="solid" draw:fill-color="#002060" draw:opacity="100%"/>
      <style:paragraph-properties fo:text-align="center" style:writing-mode="lr-tb" style:font-independent-line-spacing="tru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fo:color="#156082" loext:opacity="100%"/>
    </style:style>
    <style:style style:name="T4" style:family="text">
      <style:text-properties fo:color="#ffffff" loext:opacity="100%" style:font-name="Times New Roman" fo:font-size="20pt" style:font-size-asian="20pt" style:font-size-complex="20pt"/>
    </style:style>
    <style:style style:name="T5" style:family="text">
      <style:text-properties fo:font-variant="normal" fo:text-transform="none" fo:color="#ffffff" loext:opacity="100%" style:text-outline="false" style:text-line-through-style="none" style:text-line-through-type="none" style:text-position="0% 100%" style:font-name="Aptos"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 style:family="text">
      <style:text-properties fo:color="#000000" loext:opacity="100%" fo:font-weight="bold" style:font-weight-asian="bold" style:font-weight-complex="bold"/>
    </style:style>
    <style:style style:name="T7" style:family="text">
      <style:text-properties style:font-name="ADLaM Display" fo:font-size="22pt" style:font-size-asian="22pt" style:font-name-complex="ADLaM Display" style:font-size-complex="2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000000" svg:stroke-opacity="100%" draw:stroke-linejoin="miter" svg:stroke-linecap="butt" draw:fill="solid" draw:fill-color="#002060" draw:opacity="100%" draw:textarea-horizontal-align="left" draw:textarea-vertical-align="middle" draw:auto-grow-height="false" draw:auto-grow-width="false"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53cm" svg:stroke-color="#000000" svg:stroke-opacity="100%" draw:stroke-linejoin="miter" svg:stroke-linecap="butt" draw:fill="solid" draw:fill-color="#002060" draw:opacity="100%" draw:textarea-horizontal-align="left" draw:textarea-vertical-align="middle" draw:auto-grow-height="false" draw:auto-grow-width="false" fo:min-height="12.077cm" fo:min-width="6.985cm"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53cm" svg:stroke-color="#000000" svg:stroke-opacity="100%" draw:stroke-linejoin="miter" svg:stroke-linecap="butt" draw:fill="solid" draw:fill-color="#002060" draw:opacity="100%" draw:textarea-horizontal-align="left" draw:textarea-vertical-align="middle" draw:auto-grow-height="false" draw:auto-grow-width="false" fo:min-height="2.826cm" fo:min-width="13.189cm"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textarea-horizontal-align="left" draw:textarea-vertical-align="middle" draw:auto-grow-height="false" draw:auto-grow-width="false"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000000" svg:stroke-opacity="100%" draw:stroke-linejoin="miter" svg:stroke-linecap="butt" draw:fill="solid" draw:fill-color="#002060" draw:opacity="100%" draw:textarea-horizontal-align="left" draw:textarea-vertical-align="middle" draw:auto-grow-height="false" draw:auto-grow-width="false"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35cm" svg:stroke-color="#000000" svg:stroke-opacity="100%" draw:stroke-linejoin="miter" svg:stroke-linecap="butt" draw:fill="solid" draw:fill-color="#002060" draw:opacity="100%" draw:textarea-horizontal-align="left" draw:textarea-vertical-align="middle" draw:auto-grow-height="false" draw:auto-grow-width="false" fo:min-height="1.139cm" fo:min-width="16.198cm"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1.4cm" svg:y="2.011cm" svg:width="7.17cm" svg:height="3.281cm" draw:z-index="14">
        <draw:image xlink:href="Pictures/100000010000010F0000007C1B67FDEC.png" xlink:type="simple" xlink:show="embed" xlink:actuate="onLoad" draw:mime-type="image/png"/>
      </draw:frame>
      <text:p text:style-name="P12"><draw:custom-shape text:anchor-type="paragraph" draw:z-index="5" draw:name="Rectangle 6" draw:style-name="gr4" draw:text-style-name="P21" svg:width="6.936cm" svg:height="3.493cm" svg:x="-0.097cm" svg:y="-0.049cm"><text:p text:style-name="P20"><text:span text:style-name="T6">L2 Info – SINFL4A2</text:span></text:p><text:p text:style-name="P20"><text:span text:style-name="T6"><text:s/></text:span><text:span text:style-name="T6">Mars-Avril 2026 DEVOIR DE CONTRÔLE CONTINU</text:span></text:p><text:p text:style-name="P20"><text:span text:style-name="T6"><text:s/></text:span><text:span text:style-name="T6">SINFL4A2</text:span></text:p><draw:enhanced-geometry svg:viewBox="0 0 21600 21600" draw:type="non-primitive" draw:enhanced-path="M 0 0 L 21600 0 21600 21600 0 21600 Z N"/></draw:custom-shape><text:span text:style-name="Police_20_par_20_défaut"><text:span text:style-name="T1"/></text:span></text:p>
      <text:p text:style-name="P3"/>
      <text:p text:style-name="P3"/>
      <text:p text:style-name="P3"/>
      <text:p text:style-name="P3"/>
      <text:p text:style-name="P3"/>
      <text:p text:style-name="Normal"><draw:custom-shape text:anchor-type="paragraph" draw:z-index="1" draw:name="Parchemin : horizontal 1" draw:style-name="gr6" draw:text-style-name="P22" svg:width="16.01cm" svg:height="5.984cm" svg:x="-0.097cm" svg:y="-0.141cm"><text:p text:style-name="P20"><text:span text:style-name="T7">THEME : Jeu de puzzle à glissières (Taquin)</text:span></text:p><draw:enhanced-geometry svg:viewBox="0 0 21600 21600" draw:path-stretchpoint-x="21600" draw:path-stretchpoint-y="21600" draw:text-areas="?f29 ?f29 ?f38 ?f33" draw:glue-points="?f27 ?f29 ?f27 ?f33" draw:type="non-primitive"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 text:style-name="Police_20_par_20_défaut"><text:span text:style-name="T1"/></text:span></text:p>
      <text:p text:style-name="P3"/>
      <text:p text:style-name="P3"/>
      <text:p text:style-name="P3"/>
      <text:p text:style-name="P3"/>
      <text:p text:style-name="P3"/>
      <text:p text:style-name="P3"/>
      <text:p text:style-name="P3"/>
      <text:p text:style-name="P3"/>
      <text:p text:style-name="Normal"><draw:custom-shape text:anchor-type="paragraph" draw:z-index="4" draw:name="Parchemin : horizontal 4" draw:style-name="gr1" draw:text-style-name="P22" svg:width="9.886cm" svg:height="1.588cm" svg:x="0.589cm" svg:y="0.27cm"><text:p text:style-name="P20">MEMBRES DU GROUPE</text:p><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 text:style-name="Police_20_par_20_défaut"><text:span text:style-name="T1"/></text:span></text:p>
      <text:p text:style-name="P3"/>
      <text:p text:style-name="P3"/>
      <text:list text:style-name="L1">
        <text:list-item>
          <text:p text:style-name="P13"><text:span text:style-name="Police_20_par_20_défaut"><text:span text:style-name="T2">LO ADJI MAREMA</text:span></text:span><text:span text:style-name="Police_20_par_20_défaut"><text:span text:style-name="T1"> – N° étudiant : 22511849</text:span></text:span></text:p>
        </text:list-item>
        <text:list-item>
          <text:p text:style-name="P13"><text:span text:style-name="Police_20_par_20_défaut"><text:span text:style-name="T2">KOUTCHADE PEACE</text:span></text:span><text:span text:style-name="Police_20_par_20_défaut"><text:span text:style-name="T1"> – N° étudiant : 22412262</text:span></text:span></text:p>
        </text:list-item>
        <text:list-item>
          <text:p text:style-name="P13"><text:span text:style-name="Police_20_par_20_défaut"><text:span text:style-name="T2">AFANE MVEMBE NICOLE</text:span></text:span><text:span text:style-name="Police_20_par_20_défaut"><text:span text:style-name="T1"> – N° étudiant : 22511924?</text:span></text:span></text:p>
        </text:list-item>
      </text:list>
      <text:p text:style-name="P2"><draw:custom-shape text:anchor-type="paragraph" draw:z-index="3" draw:name="Parchemin : horizontal 4" draw:style-name="gr1" draw:text-style-name="P22" svg:width="9.886cm" svg:height="1.588cm" svg:x="0.584cm" svg:y="0.504cm"><text:p text:style-name="P20">SOUS LA SUPERVISION DE </text:p><text:p text:style-name="P20"/><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draw:custom-shape text:anchor-type="paragraph" draw:z-index="2" draw:name="Rectangle 1" draw:style-name="gr5" draw:text-style-name="P23" svg:width="8.296cm" svg:height="10.702cm" svg:x="1.536cm" svg:y="0.503cm"><text:p/><draw:enhanced-geometry svg:viewBox="0 0 21600 21600" draw:type="non-primitive" draw:enhanced-path="M 0 0 L 21600 0 21600 21600 0 21600 Z N"/></draw:custom-shape><text:span text:style-name="Police_20_par_20_défaut"><text:span text:style-name="T1"/></text:span></text:p>
      <text:p text:style-name="P4"/>
      <text:p text:style-name="P4"/>
      <text:list text:style-name="L2">
        <text:list-item>
          <text:p text:style-name="P14"><text:span text:style-name="Police_20_par_20_défaut"><text:span text:style-name="T2">Christophe Charrier</text:span></text:span><text:span text:style-name="Police_20_par_20_défaut"><text:span text:style-name="T1"> – </text:span></text:span><text:a xlink:type="simple" xlink:href="mailto:christophe.charrier@unicaen.fr" office:target-frame-name="_top" xlink:show="replace" text:style-name="Internet_20_link" text:visited-style-name="Visited_20_Internet_20_Link"><text:span text:style-name="Lien_20_hypertexte"><text:span text:style-name="T1">christophe.charrier@unicaen.fr</text:span></text:span></text:a></text:p>
        </text:list-item>
        <text:list-item>
          <text:p text:style-name="P14"><text:span text:style-name="Police_20_par_20_défaut"><text:span text:style-name="T2">Olivier Ranaivoson</text:span></text:span><text:span text:style-name="Police_20_par_20_défaut"><text:span text:style-name="T1"> – </text:span></text:span><text:a xlink:type="simple" xlink:href="mailto:solomanpionona.ranaivoson@unicaen.fr" office:target-frame-name="_top" xlink:show="replace" text:style-name="Internet_20_link" text:visited-style-name="Visited_20_Internet_20_Link"><text:span text:style-name="Lien_20_hypertexte"><text:span text:style-name="T1">solomanpionona.ranaivoson@unicaen.fr</text:span></text:span></text:a></text:p>
        </text:list-item>
        <text:list-item>
          <text:p text:style-name="P14"><text:span text:style-name="Police_20_par_20_défaut"><text:span text:style-name="T2">Yann Mathet</text:span></text:span><text:span text:style-name="Police_20_par_20_défaut"><text:span text:style-name="T1"> – </text:span></text:span><text:a xlink:type="simple" xlink:href="mailto:yann.mathet@unicaen.fr" office:target-frame-name="_top" xlink:show="replace" text:style-name="Internet_20_link" text:visited-style-name="Visited_20_Internet_20_Link"><text:span text:style-name="Lien_20_hypertexte"><text:span text:style-name="T1">yann.mathet@unicaen.fr</text:span></text:span></text:a></text:p>
        </text:list-item>
      </text:list>
      <text:p text:style-name="P8"><draw:custom-shape text:anchor-type="paragraph" draw:z-index="6" draw:name="Parchemin : horizontal 7" draw:style-name="gr3" draw:text-style-name="P19" svg:width="14.466cm" svg:height="4.105cm" svg:x="1.037cm" svg:y="0.432cm"><text:p text:style-name="P15"><text:span text:style-name="T4"><text:s text:c="26"/></text:span><text:span text:style-name="T4"><text:s text:c="7"/></text:span><text:span text:style-name="T4">PLAN <text:s/></text:span></text:p><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 text:style-name="Police_20_par_20_défaut"><text:span text:style-name="T1"/></text:span></text:p>
      <text:p text:style-name="P9"/>
      <text:p text:style-name="P3"/>
      <text:p text:style-name="P3"/>
      <text:p text:style-name="P3"/>
      <text:p text:style-name="P3"/>
      <text:p text:style-name="P3"/>
      <text:p text:style-name="P3"/>
      <text:p text:style-name="Normal"><draw:custom-shape text:anchor-type="paragraph" draw:z-index="7" draw:name="Parchemin : vertical 8" draw:style-name="gr2" draw:text-style-name="P18" svg:width="9.991cm" svg:height="14.205cm" svg:x="3.709cm" svg:y="-0.176cm"><text:p text:style-name="P17"><text:span text:style-name="T5"><text:s text:c="20"/></text:span><text:span text:style-name="T5">INTRODUCTION</text:span></text:p><text:p text:style-name="P17"><text:span text:style-name="T5"/></text:p><text:p text:style-name="P17"><text:span text:style-name="T5"><text:s text:c="12"/></text:span><text:span text:style-name="T5">I-ANALYSEDU BESOIN</text:span></text:p><text:p text:style-name="P17"><text:span text:style-name="T5"/></text:p><text:p text:style-name="P17"><text:span text:style-name="T5">II-CONCEPTION</text:span></text:p><text:p text:style-name="P17"><text:span text:style-name="T5"/></text:p><text:p text:style-name="P17"><text:span text:style-name="T5"/></text:p><text:p text:style-name="P17"><text:span text:style-name="T5">III-REALISATION</text:span></text:p><text:p text:style-name="P17"><text:span text:style-name="T5"/></text:p><text:p text:style-name="P17"><text:span text:style-name="T5"><text:s text:c="11"/></text:span><text:span text:style-name="T5">IV-TESTS ET </text:span><text:span text:style-name="T5">VALIDATION</text:span></text:p><text:p text:style-name="P17"><text:span text:style-name="T5"/></text:p><text:p text:style-name="P17"><text:span text:style-name="T5"><text:s text:c="18"/></text:span><text:span text:style-name="T5">CONCLUSION</text:span></text:p><draw:enhanced-geometry svg:viewBox="0 0 21600 21600" draw:path-stretchpoint-x="21600" draw:path-stretchpoint-y="21600" draw:text-areas="?f28 ?f28 ?f32 ?f36" draw:glue-points="?f28 ?f26 ?f32 ?f26" draw:type="non-primitive" draw:modifiers="0" draw:enhanced-path="S M ?f29 ?f21 A ?f78 ?f79 ?f80 ?f81 ?f29 ?f21 ?f75 ?f77 W ?f82 ?f83 ?f84 ?f85 ?f29 ?f21 ?f75 ?f77 L ?f29 ?f36 A ?f118 ?f119 ?f120 ?f121 ?f29 ?f36 ?f115 ?f117 W ?f122 ?f123 ?f124 ?f125 ?f29 ?f36 ?f115 ?f117 L ?f28 ?f33 ?f28 ?f29 A ?f165 ?f166 ?f167 ?f168 ?f28 ?f29 ?f162 ?f164 W ?f169 ?f170 ?f171 ?f172 ?f28 ?f29 ?f162 ?f164 L ?f35 ?f11 A ?f212 ?f213 ?f214 ?f215 ?f35 ?f11 ?f209 ?f211 W ?f216 ?f217 ?f218 ?f219 ?f35 ?f11 ?f209 ?f211 L ?f32 ?f28 ?f32 ?f36 A ?f255 ?f256 ?f257 ?f258 ?f32 ?f36 ?f252 ?f254 W ?f259 ?f260 ?f261 ?f262 ?f32 ?f36 ?f252 ?f254 Z M ?f31 ?f29 A ?f271 ?f272 ?f273 ?f274 ?f31 ?f29 ?f269 ?f270 W ?f275 ?f276 ?f277 ?f278 ?f31 ?f29 ?f269 ?f270 A ?f301 ?f302 ?f303 ?f304 ?f269 ?f270 ?f298 ?f300 W ?f305 ?f306 ?f307 ?f308 ?f269 ?f270 ?f298 ?f300 Z N S M ?f31 ?f29 A ?f271 ?f272 ?f273 ?f274 ?f31 ?f29 ?f269 ?f270 W ?f275 ?f276 ?f277 ?f278 ?f31 ?f29 ?f269 ?f270 A ?f301 ?f302 ?f303 ?f304 ?f269 ?f270 ?f298 ?f300 W ?f305 ?f306 ?f307 ?f308 ?f269 ?f270 ?f298 ?f300 Z M ?f28 ?f36 A ?f332 ?f333 ?f334 ?f335 ?f28 ?f36 ?f329 ?f331 W ?f336 ?f337 ?f338 ?f339 ?f28 ?f36 ?f329 ?f331 A ?f360 ?f361 ?f362 ?f363 ?f329 ?f331 ?f357 ?f359 W ?f364 ?f365 ?f366 ?f367 ?f329 ?f331 ?f357 ?f359 Z N F M ?f28 ?f33 L ?f28 ?f29 A ?f165 ?f166 ?f167 ?f168 ?f28 ?f29 ?f162 ?f164 W ?f169 ?f170 ?f171 ?f172 ?f28 ?f29 ?f162 ?f164 L ?f35 ?f11 A ?f212 ?f213 ?f214 ?f215 ?f35 ?f11 ?f209 ?f211 W ?f216 ?f217 ?f218 ?f219 ?f35 ?f11 ?f209 ?f211 L ?f32 ?f28 ?f32 ?f36 A ?f255 ?f256 ?f257 ?f258 ?f32 ?f36 ?f252 ?f254 W ?f259 ?f260 ?f261 ?f262 ?f32 ?f36 ?f252 ?f254 L ?f29 ?f21 A ?f376 ?f377 ?f378 ?f379 ?f29 ?f21 ?f373 ?f375 W ?f380 ?f381 ?f382 ?f383 ?f29 ?f21 ?f373 ?f375 Z M ?f34 ?f11 A ?f388 ?f213 ?f389 ?f215 ?f34 ?f11 ?f387 ?f211 W ?f390 ?f217 ?f391 ?f219 ?f34 ?f11 ?f387 ?f211 A ?f400 ?f401 ?f402 ?f403 ?f387 ?f211 ?f398 ?f399 W ?f404 ?f405 ?f406 ?f407 ?f387 ?f211 ?f398 ?f399 L ?f31 ?f29 M ?f32 ?f28 L ?f34 ?f28 M ?f29 ?f33 A ?f416 ?f417 ?f418 ?f419 ?f29 ?f33 ?f414 ?f415 W ?f420 ?f421 ?f422 ?f423 ?f29 ?f33 ?f414 ?f415 L ?f28 ?f36 M ?f29 ?f21 A ?f78 ?f79 ?f80 ?f81 ?f29 ?f21 ?f75 ?f77 W ?f82 ?f83 ?f84 ?f85 ?f29 ?f21 ?f75 ?f77 L ?f28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12500"/><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11 + ?f24"/><draw:equation draw:name="f27" draw:formula="?f25 * ?f14"/><draw:equation draw:name="f28" draw:formula="?f27 / 100000"/><draw:equation draw:name="f29" draw:formula="?f28 / 2"/><draw:equation draw:name="f30" draw:formula="?f28 / 4"/><draw:equation draw:name="f31" draw:formula="?f28 + ?f28"/><draw:equation draw:name="f32" draw:formula="?f20 - ?f28"/><draw:equation draw:name="f33" draw:formula="?f21 - ?f28"/><draw:equation draw:name="f34" draw:formula="?f28 + ?f29"/><draw:equation draw:name="f35" draw:formula="?f20 - ?f29"/><draw:equation draw:name="f36" draw:formula="?f21 - ?f29"/><draw:equation draw:name="f37" draw:formula="?f29 * ?f19"/><draw:equation draw:name="f38" draw:formula="?f30 * ?f19"/><draw:equation draw:name="f39" draw:formula="21550000 - ?f12"/><draw:equation draw:name="f40" draw:formula="if(?f39, ?f12, 21550000)"/><draw:equation draw:name="f41" draw:formula="-21550000 - ?f40"/><draw:equation draw:name="f42" draw:formula="if(?f41, -21550000, ?f40)"/><draw:equation draw:name="f43" draw:formula="?f2 + ?f42"/><draw:equation draw:name="f44" draw:formula="?f2 + ?f2"/><draw:equation draw:name="f45" draw:formula="?f44 * ?f10 / ?f1"/><draw:equation draw:name="f46" draw:formula="0 - ?f45"/><draw:equation draw:name="f47" draw:formula="cos(?f46)"/><draw:equation draw:name="f48" draw:formula="0 - ?f47"/><draw:equation draw:name="f49" draw:formula="?f48 * ?f37"/><draw:equation draw:name="f50" draw:formula="sin(?f46)"/><draw:equation draw:name="f51" draw:formula="0 - ?f50"/><draw:equation draw:name="f52" draw:formula="?f51 * ?f37"/><draw:equation draw:name="f53" draw:formula="sqrt(?f49 * ?f49 + ?f52 * ?f52 + 0 * 0)"/><draw:equation draw:name="f54" draw:formula="?f37 * ?f37 / ?f53"/><draw:equation draw:name="f55" draw:formula="?f51 * ?f54"/><draw:equation draw:name="f56" draw:formula="?f29 - ?f55"/><draw:equation draw:name="f57" draw:formula="?f48 * ?f54"/><draw:equation draw:name="f58" draw:formula="?f21 - ?f57"/><draw:equation draw:name="f59" draw:formula="?f56 - ?f37"/><draw:equation draw:name="f60" draw:formula="?f58 - ?f37"/><draw:equation draw:name="f61" draw:formula="?f56 + ?f37"/><draw:equation draw:name="f62" draw:formula="?f58 + ?f37"/><draw:equation draw:name="f63" draw:formula="?f43 + ?f2"/><draw:equation draw:name="f64" draw:formula="?f63 * ?f10 / ?f1"/><draw:equation draw:name="f65" draw:formula="0 - ?f64"/><draw:equation draw:name="f66" draw:formula="cos(?f65)"/><draw:equation draw:name="f67" draw:formula="0 - ?f66"/><draw:equation draw:name="f68" draw:formula="?f67 * ?f37"/><draw:equation draw:name="f69" draw:formula="sin(?f65)"/><draw:equation draw:name="f70" draw:formula="0 - ?f69"/><draw:equation draw:name="f71" draw:formula="?f70 * ?f37"/><draw:equation draw:name="f72" draw:formula="sqrt(?f68 * ?f68 + ?f71 * ?f71 + 0 * 0)"/><draw:equation draw:name="f73" draw:formula="?f37 * ?f37 / ?f72"/><draw:equation draw:name="f74" draw:formula="?f70 * ?f73"/><draw:equation draw:name="f75" draw:formula="?f56 + ?f74"/><draw:equation draw:name="f76" draw:formula="?f67 * ?f73"/><draw:equation draw:name="f77" draw:formula="?f58 + ?f76"/><draw:equation draw:name="f78" draw:formula="if(?f42, ?f29, ?f59)"/><draw:equation draw:name="f79" draw:formula="if(?f42, ?f21, ?f60)"/><draw:equation draw:name="f80" draw:formula="if(?f42, ?f29, ?f61)"/><draw:equation draw:name="f81" draw:formula="if(?f42, ?f21, ?f62)"/><draw:equation draw:name="f82" draw:formula="if(?f42, ?f59, ?f75)"/><draw:equation draw:name="f83" draw:formula="if(?f42, ?f60, ?f77)"/><draw:equation draw:name="f84" draw:formula="if(?f42, ?f61, ?f75)"/><draw:equation draw:name="f85" draw:formula="if(?f42, ?f62, ?f77)"/><draw:equation draw:name="f86" draw:formula="21550000 - ?f13"/><draw:equation draw:name="f87" draw:formula="if(?f86, ?f13, 21550000)"/><draw:equation draw:name="f88" draw:formula="-21550000 - ?f87"/><draw:equation draw:name="f89" draw:formula="if(?f88, -21550000, ?f87)"/><draw:equation draw:name="f90" draw:formula="?f2 + ?f89"/><draw:equation draw:name="f91" draw:formula="?f48 * ?f38"/><draw:equation draw:name="f92" draw:formula="?f51 * ?f38"/><draw:equation draw:name="f93" draw:formula="sqrt(?f91 * ?f91 + ?f92 * ?f92 + 0 * 0)"/><draw:equation draw:name="f94" draw:formula="?f38 * ?f38 / ?f93"/><draw:equation draw:name="f95" draw:formula="?f51 * ?f94"/><draw:equation draw:name="f96" draw:formula="?f29 - ?f95"/><draw:equation draw:name="f97" draw:formula="?f48 * ?f94"/><draw:equation draw:name="f98" draw:formula="?f36 - ?f97"/><draw:equation draw:name="f99" draw:formula="?f96 - ?f38"/><draw:equation draw:name="f100" draw:formula="?f98 - ?f38"/><draw:equation draw:name="f101" draw:formula="?f96 + ?f38"/><draw:equation draw:name="f102" draw:formula="?f98 + ?f38"/><draw:equation draw:name="f103" draw:formula="?f90 + ?f2"/><draw:equation draw:name="f104" draw:formula="?f103 * ?f10 / ?f1"/><draw:equation draw:name="f105" draw:formula="0 - ?f104"/><draw:equation draw:name="f106" draw:formula="cos(?f105)"/><draw:equation draw:name="f107" draw:formula="0 - ?f106"/><draw:equation draw:name="f108" draw:formula="?f107 * ?f38"/><draw:equation draw:name="f109" draw:formula="sin(?f105)"/><draw:equation draw:name="f110" draw:formula="0 - ?f109"/><draw:equation draw:name="f111" draw:formula="?f110 * ?f38"/><draw:equation draw:name="f112" draw:formula="sqrt(?f108 * ?f108 + ?f111 * ?f111 + 0 * 0)"/><draw:equation draw:name="f113" draw:formula="?f38 * ?f38 / ?f112"/><draw:equation draw:name="f114" draw:formula="?f110 * ?f113"/><draw:equation draw:name="f115" draw:formula="?f96 + ?f114"/><draw:equation draw:name="f116" draw:formula="?f107 * ?f113"/><draw:equation draw:name="f117" draw:formula="?f98 + ?f116"/><draw:equation draw:name="f118" draw:formula="if(?f89, ?f29, ?f99)"/><draw:equation draw:name="f119" draw:formula="if(?f89, ?f36, ?f100)"/><draw:equation draw:name="f120" draw:formula="if(?f89, ?f29, ?f101)"/><draw:equation draw:name="f121" draw:formula="if(?f89, ?f36, ?f102)"/><draw:equation draw:name="f122" draw:formula="if(?f89, ?f99, ?f115)"/><draw:equation draw:name="f123" draw:formula="if(?f89, ?f100, ?f117)"/><draw:equation draw:name="f124" draw:formula="if(?f89, ?f101, ?f115)"/><draw:equation draw:name="f125" draw:formula="if(?f89, ?f102, ?f117)"/><draw:equation draw:name="f126" draw:formula="21550000 - ?f2"/><draw:equation draw:name="f127" draw:formula="if(?f126, ?f2, 21550000)"/><draw:equation draw:name="f128" draw:formula="-21550000 - ?f127"/><draw:equation draw:name="f129" draw:formula="if(?f128, -21550000, ?f127)"/><draw:equation draw:name="f130" draw:formula="?f1 + ?f129"/><draw:equation draw:name="f131" draw:formula="?f1 + ?f2"/><draw:equation draw:name="f132" draw:formula="?f131 * ?f10 / ?f1"/><draw:equation draw:name="f133" draw:formula="0 - ?f132"/><draw:equation draw:name="f134" draw:formula="cos(?f133)"/><draw:equation draw:name="f135" draw:formula="0 - ?f134"/><draw:equation draw:name="f136" draw:formula="?f135 * ?f37"/><draw:equation draw:name="f137" draw:formula="sin(?f133)"/><draw:equation draw:name="f138" draw:formula="0 - ?f137"/><draw:equation draw:name="f139" draw:formula="?f138 * ?f37"/><draw:equation draw:name="f140" draw:formula="sqrt(?f136 * ?f136 + ?f139 * ?f139 + 0 * 0)"/><draw:equation draw:name="f141" draw:formula="?f37 * ?f37 / ?f140"/><draw:equation draw:name="f142" draw:formula="?f138 * ?f141"/><draw:equation draw:name="f143" draw:formula="?f28 - ?f142"/><draw:equation draw:name="f144" draw:formula="?f135 * ?f141"/><draw:equation draw:name="f145" draw:formula="?f29 - ?f144"/><draw:equation draw:name="f146" draw:formula="?f143 - ?f37"/><draw:equation draw:name="f147" draw:formula="?f145 - ?f37"/><draw:equation draw:name="f148" draw:formula="?f143 + ?f37"/><draw:equation draw:name="f149" draw:formula="?f145 + ?f37"/><draw:equation draw:name="f150" draw:formula="?f130 + ?f2"/><draw:equation draw:name="f151" draw:formula="?f150 * ?f10 / ?f1"/><draw:equation draw:name="f152" draw:formula="0 - ?f151"/><draw:equation draw:name="f153" draw:formula="cos(?f152)"/><draw:equation draw:name="f154" draw:formula="0 - ?f153"/><draw:equation draw:name="f155" draw:formula="?f154 * ?f37"/><draw:equation draw:name="f156" draw:formula="sin(?f152)"/><draw:equation draw:name="f157" draw:formula="0 - ?f156"/><draw:equation draw:name="f158" draw:formula="?f157 * ?f37"/><draw:equation draw:name="f159" draw:formula="sqrt(?f155 * ?f155 + ?f158 * ?f158 + 0 * 0)"/><draw:equation draw:name="f160" draw:formula="?f37 * ?f37 / ?f159"/><draw:equation draw:name="f161" draw:formula="?f157 * ?f160"/><draw:equation draw:name="f162" draw:formula="?f143 + ?f161"/><draw:equation draw:name="f163" draw:formula="?f154 * ?f160"/><draw:equation draw:name="f164" draw:formula="?f145 + ?f163"/><draw:equation draw:name="f165" draw:formula="if(?f129, ?f28, ?f146)"/><draw:equation draw:name="f166" draw:formula="if(?f129, ?f29, ?f147)"/><draw:equation draw:name="f167" draw:formula="if(?f129, ?f28, ?f148)"/><draw:equation draw:name="f168" draw:formula="if(?f129, ?f29, ?f149)"/><draw:equation draw:name="f169" draw:formula="if(?f129, ?f146, ?f162)"/><draw:equation draw:name="f170" draw:formula="if(?f129, ?f147, ?f164)"/><draw:equation draw:name="f171" draw:formula="if(?f129, ?f148, ?f162)"/><draw:equation draw:name="f172" draw:formula="if(?f129, ?f149, ?f164)"/><draw:equation draw:name="f173" draw:formula="21550000 - ?f1"/><draw:equation draw:name="f174" draw:formula="if(?f173, ?f1, 21550000)"/><draw:equation draw:name="f175" draw:formula="-21550000 - ?f174"/><draw:equation draw:name="f176" draw:formula="if(?f175, -21550000, ?f174)"/><draw:equation draw:name="f177" draw:formula="?f0 + ?f176"/><draw:equation draw:name="f178" draw:formula="?f0 + ?f2"/><draw:equation draw:name="f179" draw:formula="?f178 * ?f10 / ?f1"/><draw:equation draw:name="f180" draw:formula="0 - ?f179"/><draw:equation draw:name="f181" draw:formula="cos(?f180)"/><draw:equation draw:name="f182" draw:formula="0 - ?f181"/><draw:equation draw:name="f183" draw:formula="?f182 * ?f37"/><draw:equation draw:name="f184" draw:formula="sin(?f180)"/><draw:equation draw:name="f185" draw:formula="0 - ?f184"/><draw:equation draw:name="f186" draw:formula="?f185 * ?f37"/><draw:equation draw:name="f187" draw:formula="sqrt(?f183 * ?f183 + ?f186 * ?f186 + 0 * 0)"/><draw:equation draw:name="f188" draw:formula="?f37 * ?f37 / ?f187"/><draw:equation draw:name="f189" draw:formula="?f185 * ?f188"/><draw:equation draw:name="f190" draw:formula="?f35 - ?f189"/><draw:equation draw:name="f191" draw:formula="?f182 * ?f188"/><draw:equation draw:name="f192" draw:formula="?f11 - ?f191"/><draw:equation draw:name="f193" draw:formula="?f190 - ?f37"/><draw:equation draw:name="f194" draw:formula="?f192 - ?f37"/><draw:equation draw:name="f195" draw:formula="?f190 + ?f37"/><draw:equation draw:name="f196" draw:formula="?f192 + ?f37"/><draw:equation draw:name="f197" draw:formula="?f177 + ?f2"/><draw:equation draw:name="f198" draw:formula="?f197 * ?f10 / ?f1"/><draw:equation draw:name="f199" draw:formula="0 - ?f198"/><draw:equation draw:name="f200" draw:formula="cos(?f199)"/><draw:equation draw:name="f201" draw:formula="0 - ?f200"/><draw:equation draw:name="f202" draw:formula="?f201 * ?f37"/><draw:equation draw:name="f203" draw:formula="sin(?f199)"/><draw:equation draw:name="f204" draw:formula="0 - ?f203"/><draw:equation draw:name="f205" draw:formula="?f204 * ?f37"/><draw:equation draw:name="f206" draw:formula="sqrt(?f202 * ?f202 + ?f205 * ?f205 + 0 * 0)"/><draw:equation draw:name="f207" draw:formula="?f37 * ?f37 / ?f206"/><draw:equation draw:name="f208" draw:formula="?f204 * ?f207"/><draw:equation draw:name="f209" draw:formula="?f190 + ?f208"/><draw:equation draw:name="f210" draw:formula="?f201 * ?f207"/><draw:equation draw:name="f211" draw:formula="?f192 + ?f210"/><draw:equation draw:name="f212" draw:formula="if(?f176, ?f35, ?f193)"/><draw:equation draw:name="f213" draw:formula="if(?f176, ?f11, ?f194)"/><draw:equation draw:name="f214" draw:formula="if(?f176, ?f35, ?f195)"/><draw:equation draw:name="f215" draw:formula="if(?f176, ?f11, ?f196)"/><draw:equation draw:name="f216" draw:formula="if(?f176, ?f193, ?f209)"/><draw:equation draw:name="f217" draw:formula="if(?f176, ?f194, ?f211)"/><draw:equation draw:name="f218" draw:formula="if(?f176, ?f195, ?f209)"/><draw:equation draw:name="f219" draw:formula="if(?f176, ?f196, ?f211)"/><draw:equation draw:name="f220" draw:formula="?f11 + ?f129"/><draw:equation draw:name="f221" draw:formula="?f11 + ?f2"/><draw:equation draw:name="f222" draw:formula="?f221 * ?f10 / ?f1"/><draw:equation draw:name="f223" draw:formula="0 - ?f222"/><draw:equation draw:name="f224" draw:formula="cos(?f223)"/><draw:equation draw:name="f225" draw:formula="0 - ?f224"/><draw:equation draw:name="f226" draw:formula="?f225 * ?f37"/><draw:equation draw:name="f227" draw:formula="sin(?f223)"/><draw:equation draw:name="f228" draw:formula="0 - ?f227"/><draw:equation draw:name="f229" draw:formula="?f228 * ?f37"/><draw:equation draw:name="f230" draw:formula="sqrt(?f226 * ?f226 + ?f229 * ?f229 + 0 * 0)"/><draw:equation draw:name="f231" draw:formula="?f37 * ?f37 / ?f230"/><draw:equation draw:name="f232" draw:formula="?f228 * ?f231"/><draw:equation draw:name="f233" draw:formula="?f32 - ?f232"/><draw:equation draw:name="f234" draw:formula="?f225 * ?f231"/><draw:equation draw:name="f235" draw:formula="?f36 - ?f234"/><draw:equation draw:name="f236" draw:formula="?f233 - ?f37"/><draw:equation draw:name="f237" draw:formula="?f235 - ?f37"/><draw:equation draw:name="f238" draw:formula="?f233 + ?f37"/><draw:equation draw:name="f239" draw:formula="?f235 + ?f37"/><draw:equation draw:name="f240" draw:formula="?f220 + ?f2"/><draw:equation draw:name="f241" draw:formula="?f240 * ?f10 / ?f1"/><draw:equation draw:name="f242" draw:formula="0 - ?f241"/><draw:equation draw:name="f243" draw:formula="cos(?f242)"/><draw:equation draw:name="f244" draw:formula="0 - ?f243"/><draw:equation draw:name="f245" draw:formula="?f244 * ?f37"/><draw:equation draw:name="f246" draw:formula="sin(?f242)"/><draw:equation draw:name="f247" draw:formula="0 - ?f246"/><draw:equation draw:name="f248" draw:formula="?f247 * ?f37"/><draw:equation draw:name="f249" draw:formula="sqrt(?f245 * ?f245 + ?f248 * ?f248 + 0 * 0)"/><draw:equation draw:name="f250" draw:formula="?f37 * ?f37 / ?f249"/><draw:equation draw:name="f251" draw:formula="?f247 * ?f250"/><draw:equation draw:name="f252" draw:formula="?f233 + ?f251"/><draw:equation draw:name="f253" draw:formula="?f244 * ?f250"/><draw:equation draw:name="f254" draw:formula="?f235 + ?f253"/><draw:equation draw:name="f255" draw:formula="if(?f129, ?f32, ?f236)"/><draw:equation draw:name="f256" draw:formula="if(?f129, ?f36, ?f237)"/><draw:equation draw:name="f257" draw:formula="if(?f129, ?f32, ?f238)"/><draw:equation draw:name="f258" draw:formula="if(?f129, ?f36, ?f239)"/><draw:equation draw:name="f259" draw:formula="if(?f129, ?f236, ?f252)"/><draw:equation draw:name="f260" draw:formula="if(?f129, ?f237, ?f254)"/><draw:equation draw:name="f261" draw:formula="if(?f129, ?f238, ?f252)"/><draw:equation draw:name="f262" draw:formula="if(?f129, ?f239, ?f254)"/><draw:equation draw:name="f263" draw:formula="?f31 - ?f232"/><draw:equation draw:name="f264" draw:formula="?f29 - ?f234"/><draw:equation draw:name="f265" draw:formula="?f263 - ?f37"/><draw:equation draw:name="f266" draw:formula="?f264 - ?f37"/><draw:equation draw:name="f267" draw:formula="?f263 + ?f37"/><draw:equation draw:name="f268" draw:formula="?f264 + ?f37"/><draw:equation draw:name="f269" draw:formula="?f263 + ?f251"/><draw:equation draw:name="f270" draw:formula="?f264 + ?f253"/><draw:equation draw:name="f271" draw:formula="if(?f129, ?f31, ?f265)"/><draw:equation draw:name="f272" draw:formula="if(?f129, ?f29, ?f266)"/><draw:equation draw:name="f273" draw:formula="if(?f129, ?f31, ?f267)"/><draw:equation draw:name="f274" draw:formula="if(?f129, ?f29, ?f268)"/><draw:equation draw:name="f275" draw:formula="if(?f129, ?f265, ?f269)"/><draw:equation draw:name="f276" draw:formula="if(?f129, ?f266, ?f270)"/><draw:equation draw:name="f277" draw:formula="if(?f129, ?f267, ?f269)"/><draw:equation draw:name="f278" draw:formula="if(?f129, ?f268, ?f270)"/><draw:equation draw:name="f279" draw:formula="?f2 + ?f176"/><draw:equation draw:name="f280" draw:formula="?f269 - ?f95"/><draw:equation draw:name="f281" draw:formula="?f270 - ?f97"/><draw:equation draw:name="f282" draw:formula="?f280 - ?f38"/><draw:equation draw:name="f283" draw:formula="?f281 - ?f38"/><draw:equation draw:name="f284" draw:formula="?f280 + ?f38"/><draw:equation draw:name="f285" draw:formula="?f281 + ?f38"/><draw:equation draw:name="f286" draw:formula="?f279 + ?f2"/><draw:equation draw:name="f287" draw:formula="?f286 * ?f10 / ?f1"/><draw:equation draw:name="f288" draw:formula="0 - ?f287"/><draw:equation draw:name="f289" draw:formula="cos(?f288)"/><draw:equation draw:name="f290" draw:formula="0 - ?f289"/><draw:equation draw:name="f291" draw:formula="?f290 * ?f38"/><draw:equation draw:name="f292" draw:formula="sin(?f288)"/><draw:equation draw:name="f293" draw:formula="0 - ?f292"/><draw:equation draw:name="f294" draw:formula="?f293 * ?f38"/><draw:equation draw:name="f295" draw:formula="sqrt(?f291 * ?f291 + ?f294 * ?f294 + 0 * 0)"/><draw:equation draw:name="f296" draw:formula="?f38 * ?f38 / ?f295"/><draw:equation draw:name="f297" draw:formula="?f293 * ?f296"/><draw:equation draw:name="f298" draw:formula="?f280 + ?f297"/><draw:equation draw:name="f299" draw:formula="?f290 * ?f296"/><draw:equation draw:name="f300" draw:formula="?f281 + ?f299"/><draw:equation draw:name="f301" draw:formula="if(?f176, ?f269, ?f282)"/><draw:equation draw:name="f302" draw:formula="if(?f176, ?f270, ?f283)"/><draw:equation draw:name="f303" draw:formula="if(?f176, ?f269, ?f284)"/><draw:equation draw:name="f304" draw:formula="if(?f176, ?f270, ?f285)"/><draw:equation draw:name="f305" draw:formula="if(?f176, ?f282, ?f298)"/><draw:equation draw:name="f306" draw:formula="if(?f176, ?f283, ?f300)"/><draw:equation draw:name="f307" draw:formula="if(?f176, ?f284, ?f298)"/><draw:equation draw:name="f308" draw:formula="if(?f176, ?f285, ?f300)"/><draw:equation draw:name="f309" draw:formula="21550000 - ?f0"/><draw:equation draw:name="f310" draw:formula="if(?f309, ?f0, 21550000)"/><draw:equation draw:name="f311" draw:formula="-21550000 - ?f310"/><draw:equation draw:name="f312" draw:formula="if(?f311, -21550000, ?f310)"/><draw:equation draw:name="f313" draw:formula="?f11 + ?f312"/><draw:equation draw:name="f314" draw:formula="?f28 - ?f232"/><draw:equation draw:name="f315" draw:formula="?f314 - ?f37"/><draw:equation draw:name="f316" draw:formula="?f314 + ?f37"/><draw:equation draw:name="f317" draw:formula="?f313 + ?f2"/><draw:equation draw:name="f318" draw:formula="?f317 * ?f10 / ?f1"/><draw:equation draw:name="f319" draw:formula="0 - ?f318"/><draw:equation draw:name="f320" draw:formula="cos(?f319)"/><draw:equation draw:name="f321" draw:formula="0 - ?f320"/><draw:equation draw:name="f322" draw:formula="?f321 * ?f37"/><draw:equation draw:name="f323" draw:formula="sin(?f319)"/><draw:equation draw:name="f324" draw:formula="0 - ?f323"/><draw:equation draw:name="f325" draw:formula="?f324 * ?f37"/><draw:equation draw:name="f326" draw:formula="sqrt(?f322 * ?f322 + ?f325 * ?f325 + 0 * 0)"/><draw:equation draw:name="f327" draw:formula="?f37 * ?f37 / ?f326"/><draw:equation draw:name="f328" draw:formula="?f324 * ?f327"/><draw:equation draw:name="f329" draw:formula="?f314 + ?f328"/><draw:equation draw:name="f330" draw:formula="?f321 * ?f327"/><draw:equation draw:name="f331" draw:formula="?f235 + ?f330"/><draw:equation draw:name="f332" draw:formula="if(?f312, ?f28, ?f315)"/><draw:equation draw:name="f333" draw:formula="if(?f312, ?f36, ?f237)"/><draw:equation draw:name="f334" draw:formula="if(?f312, ?f28, ?f316)"/><draw:equation draw:name="f335" draw:formula="if(?f312, ?f36, ?f239)"/><draw:equation draw:name="f336" draw:formula="if(?f312, ?f315, ?f329)"/><draw:equation draw:name="f337" draw:formula="if(?f312, ?f237, ?f331)"/><draw:equation draw:name="f338" draw:formula="if(?f312, ?f316, ?f329)"/><draw:equation draw:name="f339" draw:formula="if(?f312, ?f239, ?f331)"/><draw:equation draw:name="f340" draw:formula="?f182 * ?f38"/><draw:equation draw:name="f341" draw:formula="?f185 * ?f38"/><draw:equation draw:name="f342" draw:formula="sqrt(?f340 * ?f340 + ?f341 * ?f341 + 0 * 0)"/><draw:equation draw:name="f343" draw:formula="?f38 * ?f38 / ?f342"/><draw:equation draw:name="f344" draw:formula="?f185 * ?f343"/><draw:equation draw:name="f345" draw:formula="?f329 - ?f344"/><draw:equation draw:name="f346" draw:formula="?f182 * ?f343"/><draw:equation draw:name="f347" draw:formula="?f331 - ?f346"/><draw:equation draw:name="f348" draw:formula="?f345 - ?f38"/><draw:equation draw:name="f349" draw:formula="?f347 - ?f38"/><draw:equation draw:name="f350" draw:formula="?f345 + ?f38"/><draw:equation draw:name="f351" draw:formula="?f347 + ?f38"/><draw:equation draw:name="f352" draw:formula="?f201 * ?f38"/><draw:equation draw:name="f353" draw:formula="?f204 * ?f38"/><draw:equation draw:name="f354" draw:formula="sqrt(?f352 * ?f352 + ?f353 * ?f353 + 0 * 0)"/><draw:equation draw:name="f355" draw:formula="?f38 * ?f38 / ?f354"/><draw:equation draw:name="f356" draw:formula="?f204 * ?f355"/><draw:equation draw:name="f357" draw:formula="?f345 + ?f356"/><draw:equation draw:name="f358" draw:formula="?f201 * ?f355"/><draw:equation draw:name="f359" draw:formula="?f347 + ?f358"/><draw:equation draw:name="f360" draw:formula="if(?f176, ?f329, ?f348)"/><draw:equation draw:name="f361" draw:formula="if(?f176, ?f331, ?f349)"/><draw:equation draw:name="f362" draw:formula="if(?f176, ?f329, ?f350)"/><draw:equation draw:name="f363" draw:formula="if(?f176, ?f331, ?f351)"/><draw:equation draw:name="f364" draw:formula="if(?f176, ?f348, ?f357)"/><draw:equation draw:name="f365" draw:formula="if(?f176, ?f349, ?f359)"/><draw:equation draw:name="f366" draw:formula="if(?f176, ?f350, ?f357)"/><draw:equation draw:name="f367" draw:formula="if(?f176, ?f351, ?f359)"/><draw:equation draw:name="f368" draw:formula="?f290 * ?f37"/><draw:equation draw:name="f369" draw:formula="?f293 * ?f37"/><draw:equation draw:name="f370" draw:formula="sqrt(?f368 * ?f368 + ?f369 * ?f369 + 0 * 0)"/><draw:equation draw:name="f371" draw:formula="?f37 * ?f37 / ?f370"/><draw:equation draw:name="f372" draw:formula="?f293 * ?f371"/><draw:equation draw:name="f373" draw:formula="?f56 + ?f372"/><draw:equation draw:name="f374" draw:formula="?f290 * ?f371"/><draw:equation draw:name="f375" draw:formula="?f58 + ?f374"/><draw:equation draw:name="f376" draw:formula="if(?f176, ?f29, ?f59)"/><draw:equation draw:name="f377" draw:formula="if(?f176, ?f21, ?f60)"/><draw:equation draw:name="f378" draw:formula="if(?f176, ?f29, ?f61)"/><draw:equation draw:name="f379" draw:formula="if(?f176, ?f21, ?f62)"/><draw:equation draw:name="f380" draw:formula="if(?f176, ?f59, ?f373)"/><draw:equation draw:name="f381" draw:formula="if(?f176, ?f60, ?f375)"/><draw:equation draw:name="f382" draw:formula="if(?f176, ?f61, ?f373)"/><draw:equation draw:name="f383" draw:formula="if(?f176, ?f62, ?f375)"/><draw:equation draw:name="f384" draw:formula="?f34 - ?f189"/><draw:equation draw:name="f385" draw:formula="?f384 - ?f37"/><draw:equation draw:name="f386" draw:formula="?f384 + ?f37"/><draw:equation draw:name="f387" draw:formula="?f384 + ?f208"/><draw:equation draw:name="f388" draw:formula="if(?f176, ?f34, ?f385)"/><draw:equation draw:name="f389" draw:formula="if(?f176, ?f34, ?f386)"/><draw:equation draw:name="f390" draw:formula="if(?f176, ?f385, ?f387)"/><draw:equation draw:name="f391" draw:formula="if(?f176, ?f386, ?f387)"/><draw:equation draw:name="f392" draw:formula="?f387 - ?f95"/><draw:equation draw:name="f393" draw:formula="?f211 - ?f97"/><draw:equation draw:name="f394" draw:formula="?f392 - ?f38"/><draw:equation draw:name="f395" draw:formula="?f393 - ?f38"/><draw:equation draw:name="f396" draw:formula="?f392 + ?f38"/><draw:equation draw:name="f397" draw:formula="?f393 + ?f38"/><draw:equation draw:name="f398" draw:formula="?f392 + ?f297"/><draw:equation draw:name="f399" draw:formula="?f393 + ?f299"/><draw:equation draw:name="f400" draw:formula="if(?f176, ?f387, ?f394)"/><draw:equation draw:name="f401" draw:formula="if(?f176, ?f211, ?f395)"/><draw:equation draw:name="f402" draw:formula="if(?f176, ?f387, ?f396)"/><draw:equation draw:name="f403" draw:formula="if(?f176, ?f211, ?f397)"/><draw:equation draw:name="f404" draw:formula="if(?f176, ?f394, ?f398)"/><draw:equation draw:name="f405" draw:formula="if(?f176, ?f395, ?f399)"/><draw:equation draw:name="f406" draw:formula="if(?f176, ?f396, ?f398)"/><draw:equation draw:name="f407" draw:formula="if(?f176, ?f397, ?f399)"/><draw:equation draw:name="f408" draw:formula="?f29 - ?f344"/><draw:equation draw:name="f409" draw:formula="?f33 - ?f346"/><draw:equation draw:name="f410" draw:formula="?f408 - ?f38"/><draw:equation draw:name="f411" draw:formula="?f409 - ?f38"/><draw:equation draw:name="f412" draw:formula="?f408 + ?f38"/><draw:equation draw:name="f413" draw:formula="?f409 + ?f38"/><draw:equation draw:name="f414" draw:formula="?f408 + ?f356"/><draw:equation draw:name="f415" draw:formula="?f409 + ?f358"/><draw:equation draw:name="f416" draw:formula="if(?f176, ?f29, ?f410)"/><draw:equation draw:name="f417" draw:formula="if(?f176, ?f33, ?f411)"/><draw:equation draw:name="f418" draw:formula="if(?f176, ?f29, ?f412)"/><draw:equation draw:name="f419" draw:formula="if(?f176, ?f33, ?f413)"/><draw:equation draw:name="f420" draw:formula="if(?f176, ?f410, ?f414)"/><draw:equation draw:name="f421" draw:formula="if(?f176, ?f411, ?f415)"/><draw:equation draw:name="f422" draw:formula="if(?f176, ?f412, ?f414)"/><draw:equation draw:name="f423" draw:formula="if(?f176, ?f413, ?f415)"/></draw:enhanced-geometry></draw:custom-shape><text:span text:style-name="Police_20_par_20_défaut"><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10"><draw:custom-shape text:anchor-type="paragraph" draw:z-index="8" draw:name="Parchemin : horizontal 7" draw:style-name="gr1" draw:text-style-name="P16" svg:width="14.466cm" svg:height="2.581cm" svg:x="1.131cm" svg:y="1.221cm"><text:p text:style-name="P15"><text:span text:style-name="T4"><text:s text:c="24"/></text:span><text:span text:style-name="T4"><text:s/></text:span><text:span text:style-name="T4">INTRODUCT</text:span><text:span text:style-name="T4">ION</text:span></text:p><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oft-page-break/><text:span text:style-name="Police_20_par_20_défaut"><text:span text:style-name="T1"/></text:span></text:p>
      <text:p text:style-name="P3"/>
      <text:p text:style-name="P3"/>
      <text:p text:style-name="P3"/>
      <text:p text:style-name="P3"/>
      <text:p text:style-name="P3"/>
      <text:p text:style-name="P3"/>
      <text:p text:style-name="P7">Le projet présenté dans ce rapport porte sur la réalisation d’un jeu de puzzle à glissières, plus connu sous le nom de Taquin. Le principe repose sur une grille composée de n lignes et m colonnes, dans laquelle toutes les cases sont occupées par des éléments numérotés, à l’exception d’une case vide. Le joueur peut déplacer une case adjacente vers cet espace libre afin de réorganiser progressivement le puzzle jusqu’à retrouver la configuration finale ordonnée. Ce type de jeu met en avant la réflexion, l’anticipation et la capacité à analyser une situation pour en déduire les mouvements possibles.L’objectif du projet est de concevoir une application structurée selon le modèle MVC (Modèle–Vue–Contrôleur). Le modèle regroupe l’ensemble de la logique du jeu : gestion de la grille, déplacements, vérification de l’état du puzzle, mélange initial, etc. Il est conçu pour fonctionner indépendamment de toute interface graphique. La vue existe sous deux formes : une interface graphique réalisée avec Java Swing, et une version console permettant de jouer via le clavier. Le contrôleur assure la liaison entre ces deux éléments : il interprète les actions de l’utilisateur (clics, touches directionnelles) et déclenche les modifications nécessaires dans le modèle.Ce travail s’inscrit dans le cadre de l’UE SINFL4A2 de la Licence 2 Informatique (mars–avril 2026). Il vise à mettre en pratique des notions essentielles de conception logicielle : séparation des responsabilités, modularité, lisibilité du code et capacité à produire une application robuste et maintenable.</text:p>
      <text:p text:style-name="P6"/>
      <text:p text:style-name="Normal"><draw:custom-shape text:anchor-type="paragraph" draw:z-index="9" draw:name="Parchemin : horizontal 7" draw:style-name="gr1" draw:text-style-name="P16" svg:width="14.466cm" svg:height="2.581cm" svg:x="0.499cm" svg:y="1.723cm"><text:p text:style-name="P15"><text:span text:style-name="T4"><text:s text:c="18"/></text:span><text:span text:style-name="T4">ANALYSE DU </text:span><text:span text:style-name="T4">BESOIN </text:span></text:p><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 text:style-name="Police_20_par_20_défau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LaM Display" svg:font-family="'ADLaM Display'"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fill-image draw:name="a2" xlink:href="Pictures/1000000000000283000000D6DDEC733C.jp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text-align="center" style:justify-single-word="false" fo:keep-together="always" fo:hyphenation-ladder-count="no-limit" fo:keep-with-next="always"/>
      <style:text-properties fo:color="#ffffff" loext:opacity="100%" style:font-name="Times New Roman" fo:font-family="'Times New Roman'" style:font-family-generic="roman"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text-align="center" style:justify-single-word="false" fo:keep-together="always" fo:hyphenation-ladder-count="no-limit" fo:keep-with-next="always"/>
      <style:text-properties fo:color="#ffffff" loext:opacity="100%" style:font-name="Times New Roman" fo:font-family="'Times New Roman'" style:font-family-generic="roman" style:font-pitch="variable" fo:font-size="2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22pt" style:font-weight-asian="bold"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Titre_20_2_20_Car" style:display-name="Titre 2 Car" style:family="text" style:parent-style-name="Police_20_par_20_défaut">
      <style:text-properties fo:color="#002060" loext:opacity="100%" style:font-name="Times New Roman" fo:font-family="'Times New Roman'" style:font-family-generic="roman" style:font-pitch="variable" fo:font-size="2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22pt" style:font-weight-asian="bold"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423cm" fo:margin-bottom="0.282cm" style:contextual-spacing="false" fo:text-align="center" style:justify-single-word="false" fo:padding-left="0cm" fo:padding-right="0cm" fo:padding-top="0.353cm" fo:padding-bottom="0cm" fo:border-left="none" fo:border-right="none" fo:border-top="0.74pt solid #156082" fo:border-bottom="none" style:shadow="none"/>
    </style:style>
    <style:style style:name="MT1" style:family="text">
      <style:text-properties fo:color="#156082" loext:opacity="100%"/>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9.01pt fine-dashed #002060" fo:padding-top="0cm" fo:padding-bottom="0cm" fo:padding-left="0.947cm" fo:padding-right="0.94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29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Police_20_par_20_défaut"><text:span text:style-name="MT1"><draw:frame draw:style-name="Mfr1" draw:name="Image 148 Copie 1" text:anchor-type="as-char" svg:y="0cm" svg:width="1.219cm" style:rel-width="scale" svg:height="0.769cm" style:rel-height="scale" draw:z-index="13"><draw:image xlink:href="Pictures/1000000100000187000000F62A84C253.png" xlink:type="simple" xlink:show="embed" xlink:actuate="onLoad" draw:mime-type="image/png"/></draw:frame></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AMEA Nicole</meta:initial-creator>
    <meta:creation-date>2026-03-11T16:29:00Z</meta:creation-date>
    <dc:date>2026-03-11T17:36:57.404258167</dc:date>
    <meta:editing-cycles>5</meta:editing-cycles>
    <meta:editing-duration>PT7M59S</meta:editing-duration>
    <meta:document-statistic meta:table-count="0" meta:image-count="3" meta:object-count="0" meta:page-count="4" meta:paragraph-count="9" meta:word-count="277" meta:character-count="1847" meta:non-whitespace-character-count="1580"/>
    <meta:template xlink:type="simple" xlink:actuate="onRequest" xlink:title="" xlink:href="Normal.dotm"/>
  </office:meta>
</office:document-meta>
</file>